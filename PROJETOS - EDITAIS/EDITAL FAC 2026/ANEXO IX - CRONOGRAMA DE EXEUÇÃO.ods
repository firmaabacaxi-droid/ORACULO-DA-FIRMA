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EBF1D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EBF1D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A" fo:font-size="12pt" style:font-size-asian="12pt" style:font-size-complex="12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A" fo:font-size="12pt" style:font-size-asian="12pt" style:font-size-complex="12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A" fo:font-size="12pt" style:font-size-asian="12pt" style:font-size-complex="12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EBF1D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8E4B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5.291666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1.08479166666667cm" style:use-optimal-column-width="true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1.1906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47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Plan1" table:style-name="ta1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76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string" table:number-columns-spanned="7" table:number-rows-spanned="1" table:style-name="ce18">
            <text:p>ANEXO IX - CRONOGRAMA DE EXECUÇÃO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Atividade Geral</text:p>
          </table:table-cell>
          <table:table-cell office:value-type="string" table:style-name="ce5">
            <text:p>Descrição</text:p>
          </table:table-cell>
          <table:table-cell office:value-type="string" table:style-name="ce4">
            <text:p>Local</text:p>
          </table:table-cell>
          <table:table-cell office:value-type="string" table:number-columns-spanned="2" table:number-rows-spanned="1" table:style-name="ce19">
            <text:p>Início</text:p>
          </table:table-cell>
          <table:covered-table-cell/>
          <table:table-cell office:value-type="string" table:number-columns-spanned="2" table:number-rows-spanned="1" table:style-name="ce20">
            <text:p>Término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6">
            <text:p>(ex.: realização da montagem, investigação, pesquisa, gravação, distribuição, etc)</text:p>
          </table:table-cell>
          <table:table-cell office:value-type="string" table:style-name="ce6">
            <text:p>(ex.: contração de equipe, ensaio, oficina, casting, impressão, sonorização, etc)</text:p>
          </table:table-cell>
          <table:table-cell office:value-type="string" table:style-name="ce6">
            <text:p>(RA, UF, espaço físico)</text:p>
          </table:table-cell>
          <table:table-cell office:value-type="string" table:style-name="ce6">
            <text:p>Mês</text:p>
          </table:table-cell>
          <table:table-cell office:value-type="string" table:style-name="ce6">
            <text:p>Semana</text:p>
          </table:table-cell>
          <table:table-cell office:value-type="string" table:style-name="ce7">
            <text:p>Mês<text:s/></text:p>
          </table:table-cell>
          <table:table-cell office:value-type="string" table:style-name="ce8">
            <text:p>Semana</text:p>
          </table:table-cell>
          <table:table-cell table:number-columns-repeated="16376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20">
            <text:p>Pré-Produção / Preparação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office:value-type="float" office:value="5" table:style-name="ce3">
            <text:p>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" table:style-name="ce3">
            <text:p>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" table:style-name="ce3">
            <text:p>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8" table:style-name="ce3">
            <text:p>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9" table:style-name="ce3">
            <text:p>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0" table:style-name="ce3">
            <text:p>1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1" table:style-name="ce3">
            <text:p>1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2" table:style-name="ce3">
            <text:p>1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3" table:style-name="ce3">
            <text:p>1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4" table:style-name="ce3">
            <text:p>1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5" table:style-name="ce3">
            <text:p>1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6" table:style-name="ce3">
            <text:p>1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7" table:style-name="ce3">
            <text:p>1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8" table:style-name="ce3">
            <text:p>1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9" table:style-name="ce3">
            <text:p>1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20" table:style-name="ce3">
            <text:p>20</text:p>
          </table:table-cell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1" table:style-name="ce3">
            <text:p>21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2" table:style-name="ce3">
            <text:p>22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3" table:style-name="ce3">
            <text:p>23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4" table:style-name="ce3">
            <text:p>24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5" table:style-name="ce3">
            <text:p>25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6" table:style-name="ce3">
            <text:p>26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7" table:style-name="ce3">
            <text:p>27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8" table:style-name="ce3">
            <text:p>28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9" table:style-name="ce3">
            <text:p>29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number-columns-spanned="7" table:number-rows-spanned="1" table:style-name="ce20">
            <text:p>Produção / Realização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office:value-type="float" office:value="31" table:style-name="ce3">
            <text:p>3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32" table:style-name="ce3">
            <text:p>3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33" table:style-name="ce3">
            <text:p>3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34" table:style-name="ce3">
            <text:p>3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35" table:style-name="ce3">
            <text:p>3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36" table:style-name="ce3">
            <text:p>3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37" table:style-name="ce3">
            <text:p>3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38" table:style-name="ce3">
            <text:p>3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39" table:style-name="ce3">
            <text:p>3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0" table:style-name="ce3">
            <text:p>4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1" table:style-name="ce3">
            <text:p>4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2" table:style-name="ce3">
            <text:p>4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3" table:style-name="ce3">
            <text:p>4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4" table:style-name="ce3">
            <text:p>4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5" table:style-name="ce3">
            <text:p>4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6" table:style-name="ce3">
            <text:p>4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7" table:style-name="ce3">
            <text:p>4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8" table:style-name="ce3">
            <text:p>4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9" table:style-name="ce3">
            <text:p>4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0" table:style-name="ce3">
            <text:p>5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1" table:style-name="ce3">
            <text:p>5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2" table:style-name="ce3">
            <text:p>5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3" table:style-name="ce3">
            <text:p>5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4" table:style-name="ce3">
            <text:p>5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5" table:style-name="ce3">
            <text:p>5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number-columns-spanned="7" table:number-rows-spanned="1" table:style-name="ce21">
            <text:p>Pós-Produção / Finalização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office:value-type="float" office:value="57" table:style-name="ce3">
            <text:p>5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8" table:style-name="ce3">
            <text:p>5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9" table:style-name="ce3">
            <text:p>5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0" table:style-name="ce3">
            <text:p>6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1" table:style-name="ce3">
            <text:p>6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2" table:style-name="ce3">
            <text:p>6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3" table:style-name="ce3">
            <text:p>6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4" table:style-name="ce3">
            <text:p>6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5" table:style-name="ce3">
            <text:p>6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6" table:style-name="ce3">
            <text:p>6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7" table:style-name="ce3">
            <text:p>6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8" table:style-name="ce3">
            <text:p>6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9" table:style-name="ce3">
            <text:p>6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0" table:style-name="ce3">
            <text:p>7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1" table:style-name="ce3">
            <text:p>7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2" table:style-name="ce3">
            <text:p>7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3" table:style-name="ce3">
            <text:p>7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4" table:style-name="ce3">
            <text:p>7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5" table:style-name="ce3">
            <text:p>7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6" table:style-name="ce3">
            <text:p>7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7" table:style-name="ce3">
            <text:p>7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8" table:style-name="ce3">
            <text:p>7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9" table:style-name="ce3">
            <text:p>7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80" table:style-name="ce3">
            <text:p>8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5">
          <table:table-cell office:value-type="float" office:value="81" table:style-name="ce14">
            <text:p>81</text:p>
          </table:table-cell>
          <table:table-cell table:number-columns-repeated="6" table:style-name="ce15"/>
          <table:table-cell table:style-name="ce16"/>
          <table:table-cell table:number-columns-repeated="16376"/>
        </table:table-row>
        <table:table-row table:number-rows-repeated="1048495" table:style-name="ro4">
          <table:table-cell table:number-columns-repeated="16384"/>
        </table:table-row>
      </table:table>
      <table:table table:name="Plan2" table:style-name="ta2">
        <table:table-column table:style-name="co8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Plan3" table:style-name="ta2">
        <table:table-column table:style-name="co8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exandre Vannucchi Leme da Silva</meta:initial-creator>
    <dc:creator>Fabiana</dc:creator>
    <meta:creation-date>2024-09-04T19:02:41Z</meta:creation-date>
    <dc:date>2025-05-06T16:46:39Z</dc:date>
  </office:meta>
</office:document-meta>
</file>