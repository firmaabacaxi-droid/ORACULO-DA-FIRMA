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EBF1D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EBF1D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EBF1D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EBF1D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A" fo:font-size="12pt" style:font-size-asian="12pt" style:font-size-complex="12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A" fo:font-size="12pt" style:font-size-asian="12pt" style:font-size-complex="12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color="#00000A" fo:font-size="12pt" style:font-size-asian="12pt" style:font-size-complex="12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EBF1D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8E4B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EBF1D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EBF1D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EBF1D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5.291666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1.08479166666667cm" style:use-optimal-column-width="true"/>
    </style:style>
    <style:style style:name="co6" style:family="table-column">
      <style:table-column-properties fo:break-before="auto" style:column-width="1.71979166666667cm" style:use-optimal-column-width="true"/>
    </style:style>
    <style:style style:name="co7" style:family="table-column">
      <style:table-column-properties fo:break-before="auto" style:column-width="1.190625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47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Plan1" table:style-name="ta1">
        <table:table-column table:style-name="co1" table:default-cell-style-name="ce1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6376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string" table:number-columns-spanned="7" table:number-rows-spanned="1" table:style-name="ce18">
            <text:p>ANEXO IX - CRONOGRAMA DE EXECUÇÃO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Atividade Geral</text:p>
          </table:table-cell>
          <table:table-cell office:value-type="string" table:style-name="ce5">
            <text:p>Descrição</text:p>
          </table:table-cell>
          <table:table-cell office:value-type="string" table:style-name="ce4">
            <text:p>Local</text:p>
          </table:table-cell>
          <table:table-cell office:value-type="string" table:number-columns-spanned="2" table:number-rows-spanned="1" table:style-name="ce19">
            <text:p>Início</text:p>
          </table:table-cell>
          <table:covered-table-cell/>
          <table:table-cell office:value-type="string" table:number-columns-spanned="2" table:number-rows-spanned="1" table:style-name="ce20">
            <text:p>Término</text:p>
          </table:table-cell>
          <table:covered-table-cell/>
          <table:table-cell table:number-columns-repeated="16376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string" table:style-name="ce6">
            <text:p>(ex.: realização da montagem, investigação, pesquisa, gravação, distribuição, etc)</text:p>
          </table:table-cell>
          <table:table-cell office:value-type="string" table:style-name="ce6">
            <text:p>(ex.: contração de equipe, ensaio, oficina, casting, impressão, sonorização, etc)</text:p>
          </table:table-cell>
          <table:table-cell office:value-type="string" table:style-name="ce6">
            <text:p>(RA, UF, espaço físico)</text:p>
          </table:table-cell>
          <table:table-cell office:value-type="string" table:style-name="ce6">
            <text:p>Mês</text:p>
          </table:table-cell>
          <table:table-cell office:value-type="string" table:style-name="ce6">
            <text:p>Semana</text:p>
          </table:table-cell>
          <table:table-cell office:value-type="string" table:style-name="ce7">
            <text:p>Mês<text:s/></text:p>
          </table:table-cell>
          <table:table-cell office:value-type="string" table:style-name="ce8">
            <text:p>Semana</text:p>
          </table:table-cell>
          <table:table-cell table:number-columns-repeated="16376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number-columns-spanned="7" table:number-rows-spanned="1" table:style-name="ce20">
            <text:p>Pré-Produção / Preparação</text:p>
          </table:table-cell>
          <table:covered-table-cell table:number-columns-repeated="6"/>
          <table:table-cell table:number-columns-repeated="16376"/>
        </table:table-row>
        <table:table-row table:style-name="ro4">
          <table:table-cell office:value-type="float" office:value="5" table:style-name="ce3">
            <text:p>5</text:p>
          </table:table-cell>
          <table:table-cell table:number-columns-repeated="1" table:style-name="ce9">
            <text:p>Concepção e criação dramatúrgica</text:p>
          </table:table-cell>
          <table:table-cell table:style-name="ce9">
            <text:p>Pesquisa de referências, escrita e estruturação do roteiro</text:p>
          </table:table-cell>
          <table:table-cell table:style-name="ce9">
            <text:p>Brasília - DF</text:p>
          </table:table-cell>
          <table:table-cell table:style-name="ce9">
            <text:p>1</text:p>
          </table:table-cell>
          <table:table-cell table:style-name="ce9">
            <text:p>1</text:p>
          </table:table-cell>
          <table:table-cell table:style-name="ce9">
            <text:p>2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6" table:style-name="ce3">
            <text:p>6</text:p>
          </table:table-cell>
          <table:table-cell table:number-columns-repeated="1" table:style-name="ce9">
            <text:p>Direção e pesquisa</text:p>
          </table:table-cell>
          <table:table-cell table:style-name="ce9">
            <text:p>Desenvolvimento conceitual, pesquisa artística e direção do processo criativo</text:p>
          </table:table-cell>
          <table:table-cell table:style-name="ce9">
            <text:p>Brasília - DF</text:p>
          </table:table-cell>
          <table:table-cell table:style-name="ce9">
            <text:p>1</text:p>
          </table:table-cell>
          <table:table-cell table:style-name="ce9">
            <text:p>1</text:p>
          </table:table-cell>
          <table:table-cell table:style-name="ce9">
            <text:p>2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7" table:style-name="ce3">
            <text:p>7</text:p>
          </table:table-cell>
          <table:table-cell table:number-columns-repeated="1" table:style-name="ce9">
            <text:p>Preparação corporal e vocal</text:p>
          </table:table-cell>
          <table:table-cell table:style-name="ce9">
            <text:p>Treinamento de técnicas circenses e preparação vocal do intérprete</text:p>
          </table:table-cell>
          <table:table-cell table:style-name="ce9">
            <text:p>Brasília - DF</text:p>
          </table:table-cell>
          <table:table-cell table:style-name="ce9">
            <text:p>1</text:p>
          </table:table-cell>
          <table:table-cell table:style-name="ce9">
            <text:p>1</text:p>
          </table:table-cell>
          <table:table-cell table:style-name="ce9">
            <text:p>2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8" table:style-name="ce3">
            <text:p>8</text:p>
          </table:table-cell>
          <table:table-cell table:number-columns-repeated="1" table:style-name="ce9">
            <text:p>Criação de conteúdo videoprojeção</text:p>
          </table:table-cell>
          <table:table-cell table:style-name="ce9">
            <text:p>Desenvolvimento de vídeos e mapeamento de projeção nos tecidos</text:p>
          </table:table-cell>
          <table:table-cell table:style-name="ce9">
            <text:p>Brasília - DF</text:p>
          </table:table-cell>
          <table:table-cell table:style-name="ce9">
            <text:p>1</text:p>
          </table:table-cell>
          <table:table-cell table:style-name="ce9">
            <text:p>1</text:p>
          </table:table-cell>
          <table:table-cell table:style-name="ce9">
            <text:p>2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9" table:style-name="ce3">
            <text:p>9</text:p>
          </table:table-cell>
          <table:table-cell table:number-columns-repeated="1" table:style-name="ce9">
            <text:p>Projeto cenografia e iluminação</text:p>
          </table:table-cell>
          <table:table-cell table:style-name="ce9">
            <text:p>Concepção e detalhamento técnico da cenografia e design de luz</text:p>
          </table:table-cell>
          <table:table-cell table:style-name="ce9">
            <text:p>Brasília - DF</text:p>
          </table:table-cell>
          <table:table-cell table:style-name="ce9">
            <text:p>1</text:p>
          </table:table-cell>
          <table:table-cell table:style-name="ce9">
            <text:p>1</text:p>
          </table:table-cell>
          <table:table-cell table:style-name="ce9">
            <text:p>2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10" table:style-name="ce3">
            <text:p>10</text:p>
          </table:table-cell>
          <table:table-cell table:number-columns-repeated="1" table:style-name="ce9">
            <text:p>Trilha sonora e desenho de som</text:p>
          </table:table-cell>
          <table:table-cell table:style-name="ce9">
            <text:p>Composição musical e criação de paisagem sonora original</text:p>
          </table:table-cell>
          <table:table-cell table:style-name="ce9">
            <text:p>Brasília - DF</text:p>
          </table:table-cell>
          <table:table-cell table:style-name="ce9">
            <text:p>1</text:p>
          </table:table-cell>
          <table:table-cell table:style-name="ce9">
            <text:p>1</text:p>
          </table:table-cell>
          <table:table-cell table:style-name="ce9">
            <text:p>2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11" table:style-name="ce3">
            <text:p>11</text:p>
          </table:table-cell>
          <table:table-cell table:number-columns-repeated="1" table:style-name="ce9">
            <text:p>Criação de figurinos</text:p>
          </table:table-cell>
          <table:table-cell table:style-name="ce9">
            <text:p>Pesquisa, projeto e confecção de figurinos do espetáculo</text:p>
          </table:table-cell>
          <table:table-cell table:style-name="ce9">
            <text:p>Brasília - DF</text:p>
          </table:table-cell>
          <table:table-cell table:style-name="ce9">
            <text:p>1</text:p>
          </table:table-cell>
          <table:table-cell table:style-name="ce9">
            <text:p>1</text:p>
          </table:table-cell>
          <table:table-cell table:style-name="ce9">
            <text:p>2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12" table:style-name="ce3">
            <text:p>12</text:p>
          </table:table-cell>
          <table:table-cell table:number-columns-repeated="1" table:style-name="ce9">
            <text:p>Operador de cena (ensaios)</text:p>
          </table:table-cell>
          <table:table-cell table:style-name="ce9">
            <text:p>Operação técnica nas sessões de ensaio e montagem</text:p>
          </table:table-cell>
          <table:table-cell table:style-name="ce9">
            <text:p>Brasília - DF</text:p>
          </table:table-cell>
          <table:table-cell table:style-name="ce9">
            <text:p>2</text:p>
          </table:table-cell>
          <table:table-cell table:style-name="ce9">
            <text:p>1</text:p>
          </table:table-cell>
          <table:table-cell table:style-name="ce9">
            <text:p>3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13" table:style-name="ce3">
            <text:p>13</text:p>
          </table:table-cell>
          <table:table-cell table:number-columns-repeated="1" table:style-name="ce9">
            <text:p>Aluguel de sala de ensaio</text:p>
          </table:table-cell>
          <table:table-cell table:style-name="ce9">
            <text:p>Locação de espaço para ensaios técnicos e artísticos</text:p>
          </table:table-cell>
          <table:table-cell table:style-name="ce9">
            <text:p>Brasília - DF</text:p>
          </table:table-cell>
          <table:table-cell table:style-name="ce9">
            <text:p>2</text:p>
          </table:table-cell>
          <table:table-cell table:style-name="ce9">
            <text:p>1</text:p>
          </table:table-cell>
          <table:table-cell table:style-name="ce9">
            <text:p>3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14" table:style-name="ce3">
            <text:p>14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5" table:style-name="ce3">
            <text:p>15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6" table:style-name="ce3">
            <text:p>16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7" table:style-name="ce3">
            <text:p>17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8" table:style-name="ce3">
            <text:p>18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19" table:style-name="ce3">
            <text:p>19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20" table:style-name="ce3">
            <text:p>20</text:p>
          </table:table-cell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1" table:style-name="ce3">
            <text:p>21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2" table:style-name="ce3">
            <text:p>22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3" table:style-name="ce3">
            <text:p>23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4" table:style-name="ce3">
            <text:p>24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5" table:style-name="ce3">
            <text:p>25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6" table:style-name="ce3">
            <text:p>26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7" table:style-name="ce3">
            <text:p>27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8" table:style-name="ce3">
            <text:p>28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4">
          <table:table-cell office:value-type="float" office:value="29" table:style-name="ce3">
            <text:p>29</text:p>
          </table:table-cell>
          <table:table-cell table:number-columns-repeated="6" table:style-name="ce12"/>
          <table:table-cell table:style-name="ce13"/>
          <table:table-cell table:number-columns-repeated="16376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number-columns-spanned="7" table:number-rows-spanned="1" table:style-name="ce20">
            <text:p>Produção / Realização</text:p>
          </table:table-cell>
          <table:covered-table-cell table:number-columns-repeated="6"/>
          <table:table-cell table:number-columns-repeated="16376"/>
        </table:table-row>
        <table:table-row table:style-name="ro4">
          <table:table-cell office:value-type="float" office:value="31" table:style-name="ce3">
            <text:p>31</text:p>
          </table:table-cell>
          <table:table-cell table:number-columns-repeated="1" table:style-name="ce9">
            <text:p>Ensaios e montagem (atuação)</text:p>
          </table:table-cell>
          <table:table-cell table:style-name="ce9">
            <text:p>Ensaios técnicos e artísticos, integração de todos os elementos cênicos</text:p>
          </table:table-cell>
          <table:table-cell table:style-name="ce9">
            <text:p>Brasília - DF</text:p>
          </table:table-cell>
          <table:table-cell table:style-name="ce9">
            <text:p>2</text:p>
          </table:table-cell>
          <table:table-cell table:style-name="ce9">
            <text:p>1</text:p>
          </table:table-cell>
          <table:table-cell table:style-name="ce9">
            <text:p>3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32" table:style-name="ce3">
            <text:p>32</text:p>
          </table:table-cell>
          <table:table-cell table:number-columns-repeated="1" table:style-name="ce9">
            <text:p>Assistência de direção</text:p>
          </table:table-cell>
          <table:table-cell table:style-name="ce9">
            <text:p>Apoio à direção artística nos ensaios e montagem final</text:p>
          </table:table-cell>
          <table:table-cell table:style-name="ce9">
            <text:p>Brasília - DF</text:p>
          </table:table-cell>
          <table:table-cell table:style-name="ce9">
            <text:p>2</text:p>
          </table:table-cell>
          <table:table-cell table:style-name="ce9">
            <text:p>1</text:p>
          </table:table-cell>
          <table:table-cell table:style-name="ce9">
            <text:p>3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33" table:style-name="ce3">
            <text:p>33</text:p>
          </table:table-cell>
          <table:table-cell table:number-columns-repeated="1" table:style-name="ce9">
            <text:p>Confecção cenografia, figurinos, adereços</text:p>
          </table:table-cell>
          <table:table-cell table:style-name="ce9">
            <text:p>Construção e finalização de todos os elementos cênicos</text:p>
          </table:table-cell>
          <table:table-cell table:style-name="ce9">
            <text:p>Brasília - DF</text:p>
          </table:table-cell>
          <table:table-cell table:style-name="ce9">
            <text:p>2</text:p>
          </table:table-cell>
          <table:table-cell table:style-name="ce9">
            <text:p>1</text:p>
          </table:table-cell>
          <table:table-cell table:style-name="ce9">
            <text:p>3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34" table:style-name="ce3">
            <text:p>34</text:p>
          </table:table-cell>
          <table:table-cell table:number-columns-repeated="1" table:style-name="ce9">
            <text:p>Locação de equipamentos</text:p>
          </table:table-cell>
          <table:table-cell table:style-name="ce9">
            <text:p>Aluguel de rigging, projetores, trilhos e equipamentos circenses</text:p>
          </table:table-cell>
          <table:table-cell table:style-name="ce9">
            <text:p>Brasília - DF</text:p>
          </table:table-cell>
          <table:table-cell table:style-name="ce9">
            <text:p>3</text:p>
          </table:table-cell>
          <table:table-cell table:style-name="ce9">
            <text:p>3</text:p>
          </table:table-cell>
          <table:table-cell table:style-name="ce9">
            <text:p>3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35" table:style-name="ce3">
            <text:p>35</text:p>
          </table:table-cell>
          <table:table-cell table:number-columns-repeated="1" table:style-name="ce9">
            <text:p>Montagem e testes técnicos</text:p>
          </table:table-cell>
          <table:table-cell table:style-name="ce9">
            <text:p>Montagem em teatro e testes integrados de luz, som e projeção mapeada</text:p>
          </table:table-cell>
          <table:table-cell table:style-name="ce9">
            <text:p>Brasília - DF</text:p>
          </table:table-cell>
          <table:table-cell table:style-name="ce9">
            <text:p>3</text:p>
          </table:table-cell>
          <table:table-cell table:style-name="ce9">
            <text:p>3</text:p>
          </table:table-cell>
          <table:table-cell table:style-name="ce9">
            <text:p>3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36" table:style-name="ce3">
            <text:p>36</text:p>
          </table:table-cell>
          <table:table-cell table:number-columns-repeated="1" table:style-name="ce9">
            <text:p>Apresentação 1 — Estreia</text:p>
          </table:table-cell>
          <table:table-cell table:style-name="ce9">
            <text:p>Estreia do espetáculo para público geral (semana 1)</text:p>
          </table:table-cell>
          <table:table-cell table:style-name="ce9">
            <text:p>Brasília - DF</text:p>
          </table:table-cell>
          <table:table-cell table:style-name="ce9">
            <text:p>3</text:p>
          </table:table-cell>
          <table:table-cell table:style-name="ce9">
            <text:p>1</text:p>
          </table:table-cell>
          <table:table-cell table:style-name="ce9">
            <text:p>3</text:p>
          </table:table-cell>
          <table:table-cell table:style-name="ce10">
            <text:p>1</text:p>
          </table:table-cell>
          <table:table-cell table:number-columns-repeated="16376"/>
        </table:table-row>
        <table:table-row table:style-name="ro4">
          <table:table-cell office:value-type="float" office:value="37" table:style-name="ce3">
            <text:p>37</text:p>
          </table:table-cell>
          <table:table-cell table:number-columns-repeated="1" table:style-name="ce9">
            <text:p>Apresentações 2 e 3</text:p>
          </table:table-cell>
          <table:table-cell table:style-name="ce9">
            <text:p>Segunda e terceira sessões do espetáculo (semana 2)</text:p>
          </table:table-cell>
          <table:table-cell table:style-name="ce9">
            <text:p>Brasília - DF</text:p>
          </table:table-cell>
          <table:table-cell table:style-name="ce9">
            <text:p>3</text:p>
          </table:table-cell>
          <table:table-cell table:style-name="ce9">
            <text:p>2</text:p>
          </table:table-cell>
          <table:table-cell table:style-name="ce9">
            <text:p>3</text:p>
          </table:table-cell>
          <table:table-cell table:style-name="ce10">
            <text:p>2</text:p>
          </table:table-cell>
          <table:table-cell table:number-columns-repeated="16376"/>
        </table:table-row>
        <table:table-row table:style-name="ro4">
          <table:table-cell office:value-type="float" office:value="38" table:style-name="ce3">
            <text:p>38</text:p>
          </table:table-cell>
          <table:table-cell table:number-columns-repeated="1" table:style-name="ce9">
            <text:p>Apresentações 4 e 5</text:p>
          </table:table-cell>
          <table:table-cell table:style-name="ce9">
            <text:p>Quarta e quinta sessões do espetáculo (semana 3)</text:p>
          </table:table-cell>
          <table:table-cell table:style-name="ce9">
            <text:p>Brasília - DF</text:p>
          </table:table-cell>
          <table:table-cell table:style-name="ce9">
            <text:p>3</text:p>
          </table:table-cell>
          <table:table-cell table:style-name="ce9">
            <text:p>3</text:p>
          </table:table-cell>
          <table:table-cell table:style-name="ce9">
            <text:p>3</text:p>
          </table:table-cell>
          <table:table-cell table:style-name="ce10">
            <text:p>3</text:p>
          </table:table-cell>
          <table:table-cell table:number-columns-repeated="16376"/>
        </table:table-row>
        <table:table-row table:style-name="ro4">
          <table:table-cell office:value-type="float" office:value="39" table:style-name="ce3">
            <text:p>39</text:p>
          </table:table-cell>
          <table:table-cell table:number-columns-repeated="1" table:style-name="ce9">
            <text:p>Apresentação 6 + Online</text:p>
          </table:table-cell>
          <table:table-cell table:style-name="ce9">
            <text:p>Última sessão presencial e transmissão ao vivo online acessível (semana 4)</text:p>
          </table:table-cell>
          <table:table-cell table:style-name="ce9">
            <text:p>Brasília - DF</text:p>
          </table:table-cell>
          <table:table-cell table:style-name="ce9">
            <text:p>3</text:p>
          </table:table-cell>
          <table:table-cell table:style-name="ce9">
            <text:p>4</text:p>
          </table:table-cell>
          <table:table-cell table:style-name="ce9">
            <text:p>3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40" table:style-name="ce3">
            <text:p>40</text:p>
          </table:table-cell>
          <table:table-cell table:number-columns-repeated="1" table:style-name="ce9">
            <text:p>Audiodescrição e acessibilidade</text:p>
          </table:table-cell>
          <table:table-cell table:style-name="ce9">
            <text:p>Sessão acessível com audiodescrição, Libras e recursos de inclusão</text:p>
          </table:table-cell>
          <table:table-cell table:style-name="ce9">
            <text:p>Brasília - DF</text:p>
          </table:table-cell>
          <table:table-cell table:style-name="ce9">
            <text:p>3</text:p>
          </table:table-cell>
          <table:table-cell table:style-name="ce9">
            <text:p>1</text:p>
          </table:table-cell>
          <table:table-cell table:style-name="ce9">
            <text:p>3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41" table:style-name="ce3">
            <text:p>41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2" table:style-name="ce3">
            <text:p>42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3" table:style-name="ce3">
            <text:p>43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4" table:style-name="ce3">
            <text:p>44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5" table:style-name="ce3">
            <text:p>45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6" table:style-name="ce3">
            <text:p>46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7" table:style-name="ce3">
            <text:p>47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8" table:style-name="ce3">
            <text:p>48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49" table:style-name="ce3">
            <text:p>49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0" table:style-name="ce3">
            <text:p>50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1" table:style-name="ce3">
            <text:p>51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2" table:style-name="ce3">
            <text:p>52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3" table:style-name="ce3">
            <text:p>53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4" table:style-name="ce3">
            <text:p>54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55" table:style-name="ce3">
            <text:p>55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2">
          <table:table-cell office:value-type="float" office:value="56" table:style-name="ce3">
            <text:p>56</text:p>
          </table:table-cell>
          <table:table-cell office:value-type="string" table:number-columns-spanned="7" table:number-rows-spanned="1" table:style-name="ce21">
            <text:p>Pós-Produção / Finalização</text:p>
          </table:table-cell>
          <table:covered-table-cell table:number-columns-repeated="6"/>
          <table:table-cell table:number-columns-repeated="16376"/>
        </table:table-row>
        <table:table-row table:style-name="ro4">
          <table:table-cell office:value-type="float" office:value="57" table:style-name="ce3">
            <text:p>57</text:p>
          </table:table-cell>
          <table:table-cell table:number-columns-repeated="1" table:style-name="ce9">
            <text:p>Registro audiovisual e fotografia</text:p>
          </table:table-cell>
          <table:table-cell table:style-name="ce9">
            <text:p>Captação profissional de imagens e vídeos do espetáculo em cena</text:p>
          </table:table-cell>
          <table:table-cell table:style-name="ce9">
            <text:p>Brasília - DF</text:p>
          </table:table-cell>
          <table:table-cell table:style-name="ce9">
            <text:p>3</text:p>
          </table:table-cell>
          <table:table-cell table:style-name="ce9">
            <text:p>1</text:p>
          </table:table-cell>
          <table:table-cell table:style-name="ce9">
            <text:p>4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58" table:style-name="ce3">
            <text:p>58</text:p>
          </table:table-cell>
          <table:table-cell table:number-columns-repeated="1" table:style-name="ce9">
            <text:p>Edição e finalização audiovisual</text:p>
          </table:table-cell>
          <table:table-cell table:style-name="ce9">
            <text:p>Montagem, correção de cor, mixagem e entrega do material audiovisual</text:p>
          </table:table-cell>
          <table:table-cell table:style-name="ce9">
            <text:p>Brasília - DF</text:p>
          </table:table-cell>
          <table:table-cell table:style-name="ce9">
            <text:p>4</text:p>
          </table:table-cell>
          <table:table-cell table:style-name="ce9">
            <text:p>1</text:p>
          </table:table-cell>
          <table:table-cell table:style-name="ce9">
            <text:p>5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59" table:style-name="ce3">
            <text:p>59</text:p>
          </table:table-cell>
          <table:table-cell table:number-columns-repeated="1" table:style-name="ce9">
            <text:p>Divulgação (redes, imprensa, assessoria)</text:p>
          </table:table-cell>
          <table:table-cell table:style-name="ce9">
            <text:p>Campanha em redes sociais, assessoria de imprensa e divulgação na mídia</text:p>
          </table:table-cell>
          <table:table-cell table:style-name="ce9">
            <text:p>Brasília - DF</text:p>
          </table:table-cell>
          <table:table-cell table:style-name="ce9">
            <text:p>4</text:p>
          </table:table-cell>
          <table:table-cell table:style-name="ce9">
            <text:p>1</text:p>
          </table:table-cell>
          <table:table-cell table:style-name="ce9">
            <text:p>6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60" table:style-name="ce3">
            <text:p>60</text:p>
          </table:table-cell>
          <table:table-cell table:number-columns-repeated="1" table:style-name="ce9">
            <text:p>Gestão e fechamento do projeto</text:p>
          </table:table-cell>
          <table:table-cell table:style-name="ce9">
            <text:p>Administração, prestação de contas e elaboração do relatório final</text:p>
          </table:table-cell>
          <table:table-cell table:style-name="ce9">
            <text:p>Brasília - DF</text:p>
          </table:table-cell>
          <table:table-cell table:style-name="ce9">
            <text:p>5</text:p>
          </table:table-cell>
          <table:table-cell table:style-name="ce9">
            <text:p>1</text:p>
          </table:table-cell>
          <table:table-cell table:style-name="ce9">
            <text:p>6</text:p>
          </table:table-cell>
          <table:table-cell table:style-name="ce10">
            <text:p>4</text:p>
          </table:table-cell>
          <table:table-cell table:number-columns-repeated="16376"/>
        </table:table-row>
        <table:table-row table:style-name="ro4">
          <table:table-cell office:value-type="float" office:value="61" table:style-name="ce3">
            <text:p>61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2" table:style-name="ce3">
            <text:p>62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3" table:style-name="ce3">
            <text:p>63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4" table:style-name="ce3">
            <text:p>64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5" table:style-name="ce3">
            <text:p>65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6" table:style-name="ce3">
            <text:p>66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7" table:style-name="ce3">
            <text:p>67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8" table:style-name="ce3">
            <text:p>68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69" table:style-name="ce3">
            <text:p>69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0" table:style-name="ce3">
            <text:p>70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1" table:style-name="ce3">
            <text:p>71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2" table:style-name="ce3">
            <text:p>72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3" table:style-name="ce3">
            <text:p>73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4" table:style-name="ce3">
            <text:p>74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5" table:style-name="ce3">
            <text:p>75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6" table:style-name="ce3">
            <text:p>76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7" table:style-name="ce3">
            <text:p>77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8" table:style-name="ce3">
            <text:p>78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79" table:style-name="ce3">
            <text:p>79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4">
          <table:table-cell office:value-type="float" office:value="80" table:style-name="ce3">
            <text:p>80</text:p>
          </table:table-cell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5">
          <table:table-cell office:value-type="float" office:value="81" table:style-name="ce14">
            <text:p>81</text:p>
          </table:table-cell>
          <table:table-cell table:number-columns-repeated="6" table:style-name="ce15"/>
          <table:table-cell table:style-name="ce16"/>
          <table:table-cell table:number-columns-repeated="16376"/>
        </table:table-row>
        <table:table-row table:number-rows-repeated="1048495" table:style-name="ro4">
          <table:table-cell table:number-columns-repeated="16384"/>
        </table:table-row>
      </table:table>
      <table:table table:name="Plan2" table:style-name="ta2">
        <table:table-column table:style-name="co8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Plan3" table:style-name="ta2">
        <table:table-column table:style-name="co8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initial-creator>Alexandre Vannucchi Leme da Silva</meta:initial-creator>
    <dc:creator>Fabiana</dc:creator>
    <meta:creation-date>2024-09-04T19:02:41Z</meta:creation-date>
    <dc:date>2025-05-06T16:46:39Z</dc:date>
    <meta:generator>ODFPY/1.4.1</meta:generator>
  </office:meta>
</office:document-meta>
</file>